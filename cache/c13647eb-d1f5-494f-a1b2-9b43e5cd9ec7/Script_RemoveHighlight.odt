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HighlightStyle" style:family="text" style:display-name="HighlightStyle">
      <style:text-properties fo:background-color="#ffff00"/>
    </style:style>
  </office:automatic-styles>
  <office:body>
    <office:text>
      <text:p>Staff Recruitment Phone Script</text:p>
      <text:p>Hello, may I speak with [Candidate Name] please?</text:p>
      <text:p>This is [Your Name] calling from [Company Name].</text:p>
      <text:p><text:span text:style-name="HighlightStyle">I am calling regarding your application for the position of Marketing Analyst.</text:span></text:p>
      <text:p>We were impressed by your background and would like to invite you for an interview.</text:p>
      <text:p><text:span text:style-name="HighlightStyle">Would you be available for a 30-minute call next week to discuss the role further?</text:span></text:p>
      <text:p><text:span text:style-name="HighlightStyle">Please note that this position requires availability to start by the end of the month.</text:span></text:p>
      <text:p>Do you have any initial questions about the role at this stage?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