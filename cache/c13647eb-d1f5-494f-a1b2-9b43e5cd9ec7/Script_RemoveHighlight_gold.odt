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>Staff Recruitment Phone Script</text:p>
      <text:p>Hello, may I speak with [Candidate Name] please?</text:p>
      <text:p>This is [Your Name] calling from [Company Name].</text:p>
      <text:p>I am calling regarding your application for the position of Marketing Analyst.</text:p>
      <text:p>We were impressed by your background and would like to invite you for an interview.</text:p>
      <text:p>Would you be available for a 30-minute call next week to discuss the role further?</text:p>
      <text:p>Please note that this position requires availability to start by the end of the month.</text:p>
      <text:p>Do you have any initial questions about the role at this stage?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