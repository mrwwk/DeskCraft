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automatic-styles/>
  <office:body>
    <office:text>
      <text:p>Job Interview Preparation Guide</text:p>
      <text:p>Research the company thoroughly before your interview.</text:p>
      <text:p>Prepare answers to common behavioral questions using the STAR method.</text:p>
      <text:p>Dress professionally and arrive at least 10 minutes early.</text:p>
      <text:p>Bring multiple copies of your resume and a list of references.</text:p>
      <text:p>Prepare thoughtful questions to ask the interviewer.</text:p>
      <text:p>Send a thank-you email within 24 hours of your interview.</text:p>
      <text:p>Follow up politely if you have not heard back within a week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