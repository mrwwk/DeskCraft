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automatic-styles>
    <style:style style:name="HighlightStyle" style:family="text" style:display-name="HighlightStyle">
      <style:text-properties fo:background-color="#ffff00"/>
    </style:style>
  </office:automatic-styles>
  <office:body>
    <office:text>
      <text:p>Job Interview Preparation Guide</text:p>
      <text:p>Research the company thoroughly before your interview.</text:p>
      <text:p><text:span text:style-name="HighlightStyle">Prepare answers to common behavioral questions using the STAR method.</text:span></text:p>
      <text:p>Dress professionally and arrive at least 10 minutes early.</text:p>
      <text:p><text:span text:style-name="HighlightStyle">Bring multiple copies of your resume and a list of references.</text:span></text:p>
      <text:p>Prepare thoughtful questions to ask the interviewer.</text:p>
      <text:p>Send a thank-you email within 24 hours of your interview.</text:p>
      <text:p><text:span text:style-name="HighlightStyle">Follow up politely if you have not heard back within a week.</text:span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